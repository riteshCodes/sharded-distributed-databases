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style:font-name="Liberation Sans" fo:font-size="11pt" style:font-size-asian="11pt" style:font-size-complex="11pt"/>
    </style:style>
    <style:style style:name="P2" style:family="paragraph" style:parent-style-name="Text_20_body">
      <style:text-properties style:font-name="Liberation Sans" fo:font-size="11pt" style:font-size-asian="11pt" style:font-size-complex="11pt"/>
    </style:style>
    <style:style style:name="T1" style:family="text">
      <style:text-properties style:font-name="serif"/>
    </style:style>
    <style:style style:name="T2" style:family="text">
      <style:text-properties style:font-name="serif" fo:font-size="11pt" style:font-size-asian="11pt" style:font-size-complex="11pt"/>
    </style:style>
    <style:style style:name="T3" style:family="text">
      <style:text-properties style:font-name="sans-serif"/>
    </style:style>
    <style:style style:name="T4" style:family="text">
      <style:text-properties style:font-name="Liberation Sans"/>
    </style:style>
    <style:style style:name="T5" style:family="text">
      <style:text-properties style:font-name="Liberation San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ever, interactions on social networks generate more data than can be centrally stored and managed. SNS are now inherently distributed and require a multitude of data servers to deal with the large amount of traffic. This has given rise to the concept of sharding, or the horizontal partitioning of data within a database. These partitions are then divided among the available servers. Sharding a database introduces complexities and may lower query performance, but the advantages far outweigh the shortcomings, and sharding is now employed by several popular SNSs.</text:p>
      <text:p text:style-name="P2">Most sharding practices in use employ distributed hash tables. Consistent hashing serves as the common ground for most distributed hash table implementations. Until recently, most sharding algorithms involved random hashing, where data items are mapped onto servers using a random variable. Randomness is very desirable in load balancing, and random hashing is very simple to implement and access times tend to be very uniform.</text:p>
      <text:p text:style-name="P2">However, a random distribution of shards is a hindrance to query performance in social databases. A typical user query may require the retrieval of some portion of the user’s data as well as segments from the user’s social contacts. Due to the random distribution of shards, the required data segments are not likely to be present on the same server. This can result in a large number of shards being accessed to process a single query. Every additional shard accessed involves cross-server data retrieval requests being issued. A multitude of such queries can clog the network very quickly.</text:p>
      <text:p text:style-name="P1"/>
      <text:p text:style-name="P1">The recent demand for big data processing is pushing databases to scale out, as Moore’s law has imposed a limit on the single-machine power. For higher availability and scalability, databases evolved to distribute data and computation over multiple computing nodes. </text:p>
      <text:p text:style-name="P1"/>
      <text:p text:style-name="P1"><text:bookmark text:name="page356R_mcid10"/>For scalability, a few distributed databases move away from the ACID semantics and the<text:line-break/>traditional relational model. We refer to these systems as NoSQL (Not-only SQL). NoSQL<text:line-break/>databases are accompanied by diverse data models, including key-value store (e.g., etcd [<text:bookmark text:name="page356R_mcid11"/>28<text:bookmark text:name="page356R_mcid12"/>],<text:line-break/>Redis [<text:bookmark text:name="page356R_mcid13"/>115<text:bookmark text:name="page356R_mcid14"/>]), document store (e.g., CouchDB [<text:bookmark text:name="page356R_mcid15"/>90<text:bookmark text:name="page356R_mcid16"/>]), graph store (e.g., Neo4J [<text:bookmark text:name="page356R_mcid17"/>273<text:bookmark text:name="page356R_mcid18"/>]), and<text:line-break/>column-oriented (e.g., Cassandra [<text:bookmark text:name="page356R_mcid19"/>185<text:bookmark text:name="page356R_mcid20"/>]). Another NoSQL aspect is that they no longer offer<text:line-break/>linearizability, i.e., reads must reflect the latest writes. Based on the CAP theorem [<text:bookmark text:name="page356R_mcid21"/>154<text:bookmark text:name="page356R_mcid22"/>],<text:line-break/>these NoSQL systems tilt toward availability and step away from consistency. On the other<text:line-break/>hand, NewSQL systems aim to retain the ACID semantics and the relational model despite<text:line-break/>their distributed setup. NewSQL started to gather momentum since Google’s Spanner [<text:bookmark text:name="page356R_mcid23"/>128<text:bookmark text:name="page356R_mcid24"/>]<text:line-break/>debuted as the first NewSQL database. Some databases, such as CockroachDB [<text:bookmark text:name="page356R_mcid25"/>13<text:bookmark text:name="page356R_mcid26"/>] and<text:line-break/>TiDB [<text:bookmark text:name="page356R_mcid27"/>64<text:bookmark text:name="page356R_mcid28"/>], follow this trend.</text:p>
      <text:p text:style-name="P1"/>
      <text:p text:style-name="P1"><text:bookmark text:name="page356R_mcid29"/>As we can see, databases are created for data processing. Originally on a single node,<text:line-break/>the pressing scalability demand drives databases toward distributed settings.<text:bookmark text:name="page456R_mcid18"/>Sharding partitions data into disjoint shards to concurrently manage them. The database<text:line-break/>community has extensively studied this technique as a way to scalability. </text:p>
      <text:p text:style-name="P1"/>
      <text:p text:style-name="P1"><text:bookmark text:name="page471R_mcid5"/>Sharding in distributed databases aims to scale up performance. The shard formation<text:line-break/>scheme is closely tied up to the nature of workloads. In practice, we observe that database<text:line-break/>vendors offer a variety of partitioning schemes, so that clients can choose the most suitable<text:line-break/>to fit their workloads. For example, there are two notable partitioning schemes, namely hash<text:line-break/>partitioning and range partitioning. The former can spread out workloads evenly but is not<text:line-break/>amenable to range queries. The latter scheme serves the opposite.</text:p>
      <text:p text:style-name="P1"><text:bookmark text:name="page471R_mcid9"/>Cross-Shard Transactions<text:bookmark text:name="page471R_mcid10"/><text:line-break/>Sharding exaggerates the atomicity problem when a transaction spans numerous shards.<text:line-break/>Atomicity stipulates that a cross-shard transaction should produce effects in its entirety,<text:line-break/>which is either commit or abort the effects in all the involved shards. Nowadays, the golden<text:line-break/>standard in distributed databases is the two-phase commit (2PC) protocol. This protocol<text:line-break/><text:soft-page-break/>designates a coordinator to drive the protocol. But the coordinator must be trusted; its<text:line-break/>failure would block the progress.</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22:42:50.905009240</meta:creation-date>
    <dc:date>2023-01-22T22:52:59.539697781</dc:date>
    <meta:editing-duration>PT10M8S</meta:editing-duration>
    <meta:editing-cycles>6</meta:editing-cycles>
    <meta:generator>LibreOffice/7.3.7.2$Linux_X86_64 LibreOffice_project/30$Build-2</meta:generator>
    <meta:document-statistic meta:table-count="0" meta:image-count="0" meta:object-count="0" meta:page-count="2" meta:paragraph-count="8" meta:word-count="627" meta:character-count="4119" meta:non-whitespace-character-count="3498"/>
  </office:meta>
</office:document-meta>
</file>